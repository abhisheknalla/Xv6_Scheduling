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FED846AB6B793CF.png" manifest:media-type="image/png"/>
  <manifest:file-entry manifest:full-path="Pictures/100000000000055600000300A4B5EDED224DD3E7.png" manifest:media-type="image/png"/>
  <manifest:file-entry manifest:full-path="Pictures/10000000000005560000030006BFD831B21E6EE0.png" manifest:media-type="image/png"/>
  <manifest:file-entry manifest:full-path="Pictures/100000000000055600000300E027472678D909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9cf8d" officeooo:paragraph-rsid="0019cf8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9cf8d" officeooo:paragraph-rsid="0019cf8d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9cf8d" officeooo:paragraph-rsid="002e5b06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1ee74a" officeooo:paragraph-rsid="0036993c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35c929" officeooo:paragraph-rsid="0035c929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393822" officeooo:paragraph-rsid="00393822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9cf8d" officeooo:paragraph-rsid="0019cf8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officeooo:rsid="001ee74a" officeooo:paragraph-rsid="0036993c" style:font-size-asian="14pt" style:font-size-complex="14pt"/>
    </style:style>
    <style:style style:name="P10" style:family="paragraph" style:parent-style-name="Standard">
      <style:text-properties officeooo:rsid="0023aa32" officeooo:paragraph-rsid="0023aa32"/>
    </style:style>
    <style:style style:name="T1" style:family="text">
      <style:text-properties officeooo:rsid="0019cf8d"/>
    </style:style>
    <style:style style:name="T2" style:family="text">
      <style:text-properties officeooo:rsid="0021f4f6"/>
    </style:style>
    <style:style style:name="T3" style:family="text">
      <style:text-properties officeooo:rsid="0029af64"/>
    </style:style>
    <style:style style:name="T4" style:family="text">
      <style:text-properties officeooo:rsid="002ae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OS ASSIGNMENT - 5 </text:span></text:p>
      <text:p text:style-name="P8">REPORT ON PRIORITY BASED SCHEDULING</text:p>
      <text:p text:style-name="P2"/>
      <text:p text:style-name="P4">- The scheduling can be demonstrated by the pictures attached in the folder.</text:p>
      <text:p text:style-name="P4"><text:s/></text:p>
      <text:p text:style-name="P3">- Implemented the cps syscall which shows the name,pid,state,priority of the process</text:p>
      <text:p text:style-name="P3"><draw:frame draw:style-name="fr1" draw:name="Image1" text:anchor-type="paragraph" svg:x="-0.185cm" svg:y="0.82cm" svg:width="17cm" svg:height="9.562cm" draw:z-index="0"><draw:image xlink:href="Pictures/100000000000055600000300E027472678D9096B.png" xlink:type="simple" xlink:show="embed" xlink:actuate="onLoad"/></draw:frame></text:p>
      <text:p text:style-name="P7"/>
      <text:p text:style-name="P3">- We can see that all the processes are given a default priority of 60.</text:p>
      <text:p text:style-name="P3">- The default priority has been given to the process in the function allocprocess().</text:p>
      <text:p text:style-name="P3"><draw:frame draw:style-name="fr2" draw:name="Image2" text:anchor-type="paragraph" svg:width="17cm" svg:height="9.562cm" draw:z-index="1"><draw:image xlink:href="Pictures/10000000000005560000030006BFD831B21E6EE0.png" xlink:type="simple" xlink:show="embed" xlink:actuate="onLoad"/></draw:frame><text:soft-page-break/></text:p>
      <text:p text:style-name="P3">- ps.c has been written to execute the cps syscall.</text:p>
      <text:p text:style-name="P3"/>
      <text:p text:style-name="P3">- <text:span text:style-name="T3">foo</text:span>.c has been written to create a new process</text:p>
      <text:p text:style-name="P3"/>
      <text:p text:style-name="P3">- Two processes with same priority have been created.</text:p>
      <text:p text:style-name="P3"><draw:frame draw:style-name="fr1" draw:name="Image3" text:anchor-type="paragraph" svg:x="0cm" svg:y="1.311cm" svg:width="17cm" svg:height="9.562cm" draw:z-index="2"><draw:image xlink:href="Pictures/100000000000055600000300A4B5EDED224DD3E7.png" xlink:type="simple" xlink:show="embed" xlink:actuate="onLoad"/></draw:frame></text:p>
      <text:p text:style-name="P3"><text:s/></text:p>
      <text:p text:style-name="P3"><text:soft-page-break/>- <text:s/>A process with priority 70 has been created the priority can be passed as an argument to <text:span text:style-name="T4">foo</text:span>.c which will set the priority of the process using set_priority function which takes the priority as a function.</text:p>
      <text:p text:style-name="P6"><draw:frame draw:style-name="fr2" draw:name="Image4" text:anchor-type="paragraph" svg:width="17cm" svg:height="9.562cm" draw:z-index="3"><draw:image xlink:href="Pictures/100000000000055600000300DFED846AB6B793CF.png" xlink:type="simple" xlink:show="embed" xlink:actuate="onLoad"/></draw:frame></text:p>
      <text:p text:style-name="P3">- Now another process with priority 60 has been created.</text:p>
      <text:p text:style-name="P3"/>
      <text:p text:style-name="P3">- The process with priority 70 has been preemepted to RUNNABLE state and process with priority 60 is in RUNNING state.</text:p>
      <text:p text:style-name="P3">- This observation demonstrates the priority scheduling.</text:p>
      <text:p text:style-name="P10"/>
      <text:p text:style-name="P5">COMPARISON BETWEEN ROUND-ROBIN AND PRIORITY SCHEDULING</text:p>
      <text:p text:style-name="P5"/>
      <text:p text:style-name="P9">- In round-robin all processes are scheduled in a circular manner.</text:p>
      <text:p text:style-name="P9">- Whereas in priority scheduling a process is preemped if a higher process with higher priority comes and rescheduling is done.</text:p>
      <text:p text:style-name="P9">- <text:span text:style-name="T2">In priority scheduling starvation takes place ie., lower priorities are not allocated CPU until all the processes with higher priority are ad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17:50.581155105</meta:creation-date>
    <dc:date>2017-11-06T01:12:06.126201867</dc:date>
    <meta:editing-duration>PT5H8M43S</meta:editing-duration>
    <meta:editing-cycles>37</meta:editing-cycles>
    <meta:generator>LibreOffice/5.2.2.2$Linux_X86_64 LibreOffice_project/20m0$Build-2</meta:generator>
    <meta:document-statistic meta:table-count="0" meta:image-count="4" meta:object-count="0" meta:page-count="3" meta:paragraph-count="19" meta:word-count="228" meta:character-count="1356" meta:non-whitespace-character-count="1139"/>
  </office:meta>
</office:document-meta>
</file>